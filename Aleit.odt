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style:font-name="Arial" fo:font-weight="bold" style:font-weight-asian="bold" style:font-weight-complex="bold" fo:font-size="16pt" style:font-size-asian="16pt" style:font-size-complex="16pt"/>
    </style:style>
    <style:style style:name="P3" style:parent-style-name="Standard" style:family="paragraph">
      <style:paragraph-properties fo:text-align="justify"/>
      <style:text-properties style:font-name="Arial" fo:font-size="14pt" style:font-size-asian="14pt" style:font-size-complex="14pt"/>
    </style:style>
    <style:style style:name="P4" style:parent-style-name="Standard" style:family="paragraph">
      <style:paragraph-properties fo:text-align="justify"/>
      <style:text-properties style:font-name="Arial" fo:font-size="14pt" style:font-size-asian="14pt" style:font-size-complex="14pt"/>
    </style:style>
    <style:style style:name="P5" style:parent-style-name="Standard" style:family="paragraph">
      <style:paragraph-properties fo:text-align="justify"/>
      <style:text-properties style:font-name="Arial" fo:font-size="14pt" style:font-size-asian="14pt" style:font-size-complex="14pt"/>
    </style:style>
    <style:style style:name="P6" style:parent-style-name="Standard" style:family="paragraph">
      <style:paragraph-properties fo:text-align="justify"/>
      <style:text-properties style:font-name="Arial" fo:font-size="14pt" style:font-size-asian="14pt" style:font-size-complex="14pt"/>
    </style:style>
    <style:style style:name="P7" style:parent-style-name="Standard" style:family="paragraph">
      <style:paragraph-properties fo:text-align="justify"/>
    </style:style>
    <style:style style:name="T8" style:parent-style-name="Absatz-Standardschriftart" style:family="text">
      <style:text-properties style:font-name="Arial" fo:font-size="14pt" style:font-size-asian="14pt" style:font-size-complex="14pt"/>
    </style:style>
  </office:automatic-styles>
  <office:body>
    <office:text text:use-soft-page-breaks="true">
      <text:p text:style-name="P1">Aleit</text:p>
      <text:p text:style-name="P2"/>
      <text:p text:style-name="P3">Aleit wurde als das zweite von sieben Kindern geboren. Der Hof seiner Eltern gehörte zu Halfas, einer Siedlung einen halben Tagesmarsch von Heune entfernt. Dort bauten sie Gerste, Weizen, Linsen und Leinen an und hielten Tiere.</text:p>
      <text:p text:style-name="P4">Aleits Kindheit war geprägt vom Leben auf dem Hof: Aussaht und Ernte, Pflege und Aufzucht der Tiere und die Instandhaltung des Hofes bestimmte den Alltag. Lediglich zu den großen Festen ging die Familie zur Kultstätte in Heune. So wuchs Aleit als ruhiger, etwas ernster, aber fürsorglich mit seinen Geschwistern umgehender Junge heran.</text:p>
      <text:p text:style-name="P5">In seinem zwölften Lebensjahr jedoch erhielt die Familie Besuch von Belthis, dem Druiden des Dorfes, der sie bat Aleit bei sich in die Lehre nehmen zu dürfen. Dies galt als große Ehre und wurde von den Eltern natürlich angenommen. Dadurch änderte sich Aleits leben. Er lernte von Belthis die Bedeutung und Namen der Feste im Jahresverlauf, die entsprechenden Kulthandlungen, wie man sie am Stand der Gestirne bestimmt und welche Mythen mit ihnen verbunden werden. Er lernte auch die Bedeutungen der Pflanzen und ihre heilenden Kräfte, ein Gebiet auf dem er sich besonders hervortat.</text:p>
      <text:p text:style-name="P6">Mit Beendigung seines achtzehnten Lebensjahres erhielt er seinen Druidenstab, ein Zeichen seiner Weihe und Reife als Junger Druide, und schnitze<text:s/>in<text:s/>diesen<text:s/>sein erstes Zeichen, das Zeichen seines ersten Lehrers Belthis. Hiernach begab er sich auf Wanderschaft zu den Druiden der umliegenden Stämme und Siedlungen um Wissen und Geschichten zu sammeln und zu verbreiten. Wenn die dortigen Druiden mit Ihm zufrieden waren schnitzten sie ihre Zeichen in seinen Stab.</text:p>
      <text:p text:style-name="P7"><text:span text:style-name="T8">Mit 22 erregte er das Interesse von Welarion, dem hohen Druiden von Heune und Mitglied des hohen Rates und des inneren Zirkels. Etwa ein halbes Jahr nach dieser Begegnung und Aufnahme öffneten sich die ersten Portale. Es wurde ein Hoher Rat aller Stämme einberufen und auf diesem wurde auf Welarions Vorschlag hin Aleit durch das Portal am Oberlauf des Rem entsand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Valentin Gerdon</dc:creator>
    <meta:creation-date>2026-01-25T15:10:00Z</meta:creation-date>
    <dc:date>2026-04-24T06:16:00Z</dc:date>
    <meta:template xlink:href="Normal.dotm" xlink:type="simple"/>
    <meta:editing-cycles>8</meta:editing-cycles>
    <meta:editing-duration>PT0S</meta:editing-duration>
    <meta:document-statistic meta:page-count="1" meta:paragraph-count="3" meta:word-count="271" meta:character-count="1980" meta:row-count="14" meta:non-whitespace-character-count="1712"/>
  </office:meta>
</office:document-meta>
</file>